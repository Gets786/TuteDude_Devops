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inux_Libertine_G_4.ttf" manifest:media-type="application/x-font-ttf"/>
  <manifest:file-entry manifest:full-path="Fonts/Font_Linux_Libertine_G_3.ttf" manifest:media-type="application/x-font-ttf"/>
  <manifest:file-entry manifest:full-path="Fonts/Font_Linux_Libertine_G_2.ttf" manifest:media-type="application/x-font-ttf"/>
  <manifest:file-entry manifest:full-path="Fonts/Font_Linux_Libertine_G_1.ttf" manifest:media-type="application/x-font-ttf"/>
  <manifest:file-entry manifest:full-path="Pictures/10000000000005A00000038433B4C61A.png" manifest:media-type="image/png"/>
  <manifest:file-entry manifest:full-path="Pictures/10000000000005A00000038406485079.png" manifest:media-type="image/png"/>
  <manifest:file-entry manifest:full-path="Pictures/10000000000005A000000384214EACDD.png" manifest:media-type="image/png"/>
  <manifest:file-entry manifest:full-path="Pictures/10000000000005A000000384847025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Standard">
      <style:paragraph-properties fo:margin-top="0.423cm" fo:margin-bottom="0cm" style:contextual-spacing="false" fo:line-height="150%" style:page-number="1"/>
      <style:text-properties fo:font-size="12pt" style:font-size-asian="12pt" style:font-size-complex="12pt"/>
    </style:style>
    <style:style style:name="P2" style:family="paragraph" style:parent-style-name="Standard">
      <style:paragraph-properties fo:margin-top="0.423cm" fo:margin-bottom="0cm" style:contextual-spacing="false" fo:line-height="150%"/>
      <style:text-properties fo:font-size="12pt" style:font-size-asian="12pt" style:font-size-complex="12pt"/>
    </style:style>
    <style:style style:name="P3" style:family="paragraph" style:parent-style-name="Standard">
      <style:paragraph-properties fo:margin-top="0.423cm" fo:margin-bottom="0cm" style:contextual-spacing="false" fo:line-height="150%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Grade Checker</text:p>
      <text:p text:style-name="P2">Take a score as input and print the grade based on the following:</text:p>
      <text:p text:style-name="P2">90+ : "A"</text:p>
      <text:p text:style-name="P2">80-89 : "B"</text:p>
      <text:p text:style-name="P2">70-79 : "C"</text:p>
      <text:p text:style-name="P2">60-69 : "D"</text:p>
      <text:p text:style-name="P2">Below 60 : "F"</text:p>
      <text:p text:style-name="P2">here we used a basic if else statement to carry out marks and all.</text:p>
      <text:p text:style-name="P2"><draw:frame draw:style-name="fr1" draw:name="Image1" text:anchor-type="char" svg:width="16.51cm" svg:height="10.425cm" draw:z-index="0"><draw:image xlink:href="Pictures/10000000000005A000000384847025AC.png" xlink:type="simple" xlink:show="embed" xlink:actuate="onLoad" draw:mime-type="image/png"/></draw:frame></text:p>
      <text:p text:style-name="P2"/>
      <text:p text:style-name="P2"><text:soft-page-break/>2 Student Grades</text:p>
      <text:p text:style-name="P2">Create a dictionary where the keys are student names and the values are their grades. Allow the user to:</text:p>
      <text:p text:style-name="P2">Add a new student and grade.</text:p>
      <text:p text:style-name="P2">Update an existing student’s grade.</text:p>
      <text:p text:style-name="P2">Print all student grades.</text:p>
      <text:p text:style-name="P2"/>
      <text:p text:style-name="P2">Used dictionary and basic operations. Using if else</text:p>
      <text:p text:style-name="P2"/>
      <text:p text:style-name="P2"/>
      <text:p text:style-name="P2"><draw:frame draw:style-name="fr2" draw:name="Image2" text:anchor-type="char" svg:width="16.51cm" svg:height="10.425cm" draw:z-index="1"><draw:image xlink:href="Pictures/10000000000005A000000384214EACDD.png" xlink:type="simple" xlink:show="embed" xlink:actuate="onLoad" draw:mime-type="image/png"/></draw:frame></text:p>
      <text:p text:style-name="P2"><text:soft-page-break/></text:p>
      <text:p text:style-name="P2"/>
      <text:p text:style-name="P2"/>
      <text:p text:style-name="P2"/>
      <text:p text:style-name="P2"/>
      <text:p text:style-name="P2">3.Write to a File</text:p>
      <text:p text:style-name="P2">Write a program to create a text file and write some content to it.<draw:frame draw:style-name="fr2" draw:name="Image3" text:anchor-type="char" svg:width="16.51cm" svg:height="10.425cm" draw:z-index="2"><draw:image xlink:href="Pictures/10000000000005A00000038406485079.png" xlink:type="simple" xlink:show="embed" xlink:actuate="onLoad" draw:mime-type="image/png"/></draw:frame></text:p>
      <text:p text:style-name="P2">Using file functions like write and open.</text:p>
      <text:p text:style-name="P2"/>
      <text:p text:style-name="P2"/>
      <text:p text:style-name="P2"/>
      <text:p text:style-name="P2"><text:soft-page-break/></text:p>
      <text:p text:style-name="P2"/>
      <text:p text:style-name="P2">4. Read from a File</text:p>
      <text:p text:style-name="P2">We used open in read mode and file.read to read and print to display.</text:p>
      <text:p text:style-name="P2"><draw:frame draw:style-name="fr1" draw:name="Image4" text:anchor-type="char" svg:width="16.51cm" svg:height="10.425cm" draw:z-index="3"><draw:image xlink:href="Pictures/10000000000005A00000038433B4C61A.png" xlink:type="simple" xlink:show="embed" xlink:actuate="onLoad" draw:mime-type="image/png"/></draw:frame></text:p>
      <text:p text:style-name="Standard"><text:span text:style-name="T1">Submission Guidelines -: </text:span><text:span text:style-name="T2">Attach Screenshots or command along with explanation and submit in doc(google doc or microsoft doc) format or share github link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lef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Linux_X86_64 LibreOffice_project/d4d5ed47b6084125f28d269a5650105d54dde034</meta:generator>
    <dc:date>2026-06-14T17:40:50.034497511</dc:date>
    <meta:editing-duration>PT2H15M23S</meta:editing-duration>
    <meta:editing-cycles>3</meta:editing-cycles>
    <meta:document-statistic meta:table-count="0" meta:image-count="4" meta:object-count="0" meta:page-count="4" meta:paragraph-count="20" meta:word-count="158" meta:character-count="827" meta:non-whitespace-character-count="689"/>
  </office:meta>
</office:document-meta>
</file>